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792cm" fo:margin-left="0.222cm" table:align="left"/>
    </style:style>
    <style:style style:name="Tabla1.A" style:family="table-column">
      <style:table-column-properties style:column-width="16.792cm"/>
    </style:style>
    <style:style style:name="Tabla1.A1" style:family="table-cell">
      <style:table-cell-properties fo:background-color="#ffff00" fo:padding="0.097cm" fo:border="0.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032d73" officeooo:paragraph-rsid="00032d73"/>
    </style:style>
    <style:style style:name="P2" style:family="paragraph" style:parent-style-name="Text_20_body">
      <style:text-properties officeooo:rsid="00032d73"/>
    </style:style>
    <style:style style:name="P3" style:family="paragraph" style:parent-style-name="Text_20_body" style:list-style-name="L1">
      <style:text-properties officeooo:rsid="00032d73"/>
    </style:style>
    <style:style style:name="P4" style:family="paragraph" style:parent-style-name="Standard">
      <style:text-properties officeooo:rsid="00032d73" officeooo:paragraph-rsid="00032d7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Strong_20_Emphasis">IES JOAN RAMIS I RAMIS</text:span></text:p>
            <text:p text:style-name="P2">Carrer de la Cultura, 7<text:line-break/>MAÓ<text:line-break/>Maó</text:p>
            <text:p text:style-name="P2"><text:span text:style-name="Strong_20_Emphasis">Xerox Menorca</text:span><text:line-break/>Carrer de l'Industria, 15<text:line-break/>Polígon Industrial de Maó<text:line-break/>MAÓ</text:p>
            <text:p text:style-name="P2">Benvolgut Joan,</text:p>
            <text:p text:style-name="P2">Ens dirigim a vostè per comunicar-li que, després de revisar els equips disponibles, hem decidit fer una comanda a la següent distribució de la nostra empresa.</text:p>
            <text:p text:style-name="P2"><text:span text:style-name="Strong_20_Emphasis">Equips disponibles per comanda:</text:span></text:p>
            <text:list text:style-name="L1">
              <text:list-item>
                <text:p text:style-name="P3"><text:span text:style-name="Strong_20_Emphasis">Xerox Phaser 7100</text:span></text:p>
              </text:list-item>
              <text:list-item>
                <text:p text:style-name="P3"><text:span text:style-name="Strong_20_Emphasis">Xerox WorkCentre 3335</text:span></text:p>
              </text:list-item>
            </text:list>
            <text:p text:style-name="P2">Aquesta comanda es farà a través de la comanda i el seguiment des de Xeroxmenorca.</text:p>
            <text:p text:style-name="P2"><text:span text:style-name="Strong_20_Emphasis">A l'espera de la recepció de la seva comanda, els saluda cordialment,</text:span></text:p>
            <text:p text:style-name="P2">Ma José Garcés Blasco<text:line-break/>Directora de IES Joan Ramis i Ramis<text:line-break/>Maó, 18 de gener de 2025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05:26.434346422</meta:creation-date>
    <dc:date>2025-10-29T12:09:43.318645800</dc:date>
    <meta:editing-duration>PT4M17S</meta:editing-duration>
    <meta:editing-cycles>1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1" meta:word-count="107" meta:character-count="600" meta:non-whitespace-character-count="506"/>
  </office:meta>
</office:document-meta>
</file>